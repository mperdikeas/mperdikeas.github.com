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fo:color="#55308d" loext:opacity="100%" fo:background-color="transparent" loext:char-shading-value="0"/>
    </style:style>
    <style:style style:name="T2" style:family="text">
      <style:text-properties fo:color="#55308d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6e5d"/>
    </style:style>
    <style:style style:name="T5" style:family="text">
      <style:text-properties fo:color="#55308d" loext:opacity="100%" officeooo:rsid="00046e5d"/>
    </style:style>
    <style:style style:name="T6" style:family="text">
      <style:text-properties fo:font-weight="bold" officeooo:rsid="00046e5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’</text:p>
      <text:p text:style-name="P2">ΜΑΚΑΡΙΟΣ ἀνήρ, ὃς οὐκ ἐπορεύθη<text:line-break/><text:tab/><text:span text:style-name="T1">ὅτι γινώσκει Κύριος ὁδὸν δικαίων, καὶ ὁδὸς ἀσεβῶν ἀπολεῖται</text:span></text:p>
      <text:p text:style-name="P1">Γ’</text:p>
      <text:p text:style-name="P2">ΚΥΡΙΕ, τί ἐπληθύνθησαν οἱ θλίβοντές με<text:line-break/><text:tab/><text:span text:style-name="T2">τοῦ Κυρίου ἡ σωτηρία, καὶ ἐπὶ τὸν λαόν σου ἡ εὐλογία σου</text:span><text:line-break/><text:span text:style-name="T3">Ϛ’</text:span><text:line-break/>Κύριε, μὴ τῷ θυμῷ σου ἐλέγξῃς με μηδὲ τῇ</text:p>
      <text:p text:style-name="P2">ὀργῇ σου παιδεύσῃς με. ἐλέησόν με, κύριε, ὅτι ἀσθενής εἰμι<text:line-break/><text:tab/><text:span text:style-name="T2">ἀποστραφείησαν καὶ καταισχυνθείησαν σφόδρα διὰ τάχους</text:span><text:line-break/><text:span text:style-name="T3">ΛΖ’ (37)</text:span><text:line-break/>ΚΥΡΙΕ, μὴ τῷ θυμῷ σου ἐλέγξῃς με, μηδὲ τῇ</text:p>
      <text:p text:style-name="P2">ὀργῇ σου παιδεύσῃς με. ὅτι τὰ βέλη σου ἐνεπάγησάν μο<text:span text:style-name="T4">ι<text:line-break/></text:span><text:span text:style-name="T5"><text:tab/>πρόσχες εἰς τὴν βοήθειάν μου, Κύριε τῆς σωτηρίας μου</text:span><text:span text:style-name="T4"><text:line-break/></text:span><text:span text:style-name="T6">N’ (50)</text:span><text:span text:style-name="T4"><text:line-break/>ΕΛΕΗΣΟΝ με, ὁ Θεός, κατὰ τὸ μέγα ἔλεός </text:span>σου<text:line-break/><text:tab/><text:span text:style-name="T2">ότε ἀνοίσουσιν ἐπὶ τὸ θυσιαστήριόν σου μόσχους</text:span><text:line-break/><text:span text:style-name="T3">ΞΒ’ (62)</text:span><text:line-break/>Ο ΘΕΟΣ ὁ Θεός μου, πρὸς σὲ ὀρθρίζω<text:line-break/><text:span text:style-name="T2"><text:tab/>ὅτι ἐνεφράγη στόμα λαλούντων ἄδικα</text:span><text:line-break/><text:span text:style-name="T3">ΞΘ’ (69)</text:span><text:line-break/>Ο ΘΕΟΣ, εἰς τὴν βοήθειάν μου πρόσχες·</text:p>
      <text:p text:style-name="P2">Κύριε, εἰς τὸ βοηθῆσαί μοι σπεῦσον<text:line-break/><text:tab/><text:span text:style-name="T2">βοηθός μου καὶ ῥύστης μου εἶ σύ· Κύριε, μὴ χρονίσῃς</text:span><text:line-break/><text:span text:style-name="T3">ΠΖ’ (87)</text:span><text:line-break/>ΚΥΡΙΕ ὁ Θεὸς τῆς σωτηρίας μου, ἡμέρας</text:p>
      <text:p text:style-name="P2">ἐκέκραξα καὶ ἐν νυκτὶ ἐναντίον σου·<text:line-break/><text:tab/><text:span text:style-name="T2">ἐμάκρυνας ἀπ᾿ ἐμοῦ φίλον καὶ πλησίον καὶ τοὺς γνωστούς μου ἀπὸ ταλαιπωρίας.</text:span><text:line-break/><text:span text:style-name="T3">Ϟ' (90)</text:span><text:line-break/>Ο ΚΑΤΟΙΚΩΝ ἐν βοηθείᾳ τοῦ Ὑψίστου, ἐν</text:p>
      <text:p text:style-name="P2">σκέπῃ τοῦ Θεοῦ τοῦ οὐρανοῦ αὐλισθήσεται.<text:line-break/><text:tab/><text:span text:style-name="T2">δείξω αὐτῷ τὸ σωτήριόν μου</text:span><text:span text:style-name="T3"><text:line-break/>ΡΒ’ (102)</text:span></text:p>
      <text:p text:style-name="P2">ΕΥΛΟΓΕΙ, ἡ ψυχή μου, τὸν Κύριον καί, πάντα</text:p>
      <text:p text:style-name="P2">τὰ ἐντός μου, τὸ ὄνομα τὸ ἅγιον αὐτοῦ·<text:line-break/><text:tab/><text:span text:style-name="T2">εὐλόγει, ἡ ψυχή μου, τὸν Κύριον</text:span><text:line-break/><text:span text:style-name="T3">ΡΜΑ’ (141)</text:span></text:p>
      <text:p text:style-name="P2">ΦΩΝΗ μου πρὸς Κύριον ἐκέκραξα, φωνῇ μου</text:p>
      <text:p text:style-name="P2">πρὸς Κύριον ἐδεήθην.<text:line-break/><text:tab/><text:span text:style-name="T2">ἐμὲ ὑπομενοῦσι δίκαιοι, ἕως οὗ ἀνταποδῷς μοι</text:span><text:line-break/><text:span text:style-name="T3">ΡΜΒ’ (142)</text:span></text:p>
      <text:p text:style-name="P2">ΚΥΡΙΕ, εἰσάκουσον τῆς προσευχῆς μου,</text:p>
      <text:p text:style-name="P2">ἐνώτισαι τὴν δέησίν μου ἐν τῇ ἀληθείᾳ σου<text:line-break/><text:span text:style-name="T2"><text:tab/>ὅτι ἐγὼ δοῦλός σού εἰμι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2.1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18:08:45.029534888</meta:creation-date>
    <dc:date>2026-06-10T20:35:55.007208534</dc:date>
    <meta:editing-duration>PT12M24S</meta:editing-duration>
    <meta:editing-cycles>5</meta:editing-cycles>
    <meta:generator>LibreOffice/26.2.3.2$Linux_X86_64 LibreOffice_project/d4d5ed47b6084125f28d269a5650105d54dde034</meta:generator>
    <meta:print-date>2026-06-10T20:36:08.144119982</meta:print-date>
    <meta:document-statistic meta:table-count="0" meta:image-count="0" meta:object-count="0" meta:page-count="1" meta:paragraph-count="15" meta:word-count="258" meta:character-count="1444" meta:non-whitespace-character-count="1189"/>
  </office:meta>
</office:document-meta>
</file>